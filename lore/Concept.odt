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5b1b" officeooo:paragraph-rsid="000e5b1b"/>
    </style:style>
    <style:style style:name="P2" style:family="paragraph" style:parent-style-name="Standard">
      <style:text-properties officeooo:paragraph-rsid="000e97a8"/>
    </style:style>
    <style:style style:name="P3" style:family="paragraph" style:parent-style-name="Standard">
      <style:text-properties officeooo:rsid="000e97a8" officeooo:paragraph-rsid="000e97a8"/>
    </style:style>
    <style:style style:name="P4" style:family="paragraph" style:parent-style-name="Standard">
      <style:text-properties officeooo:rsid="000ee91d" officeooo:paragraph-rsid="000ee91d"/>
    </style:style>
    <style:style style:name="T1" style:family="text">
      <style:text-properties officeooo:rsid="000e5b1b"/>
    </style:style>
    <style:style style:name="T2" style:family="text">
      <style:text-properties officeooo:rsid="000e97a8"/>
    </style:style>
    <style:style style:name="T3" style:family="text">
      <style:text-properties fo:font-style="normal" style:font-style-asian="normal" style:font-style-complex="normal"/>
    </style:style>
    <style:style style:name="T4" style:family="text">
      <style:text-properties officeooo:rsid="000f1b06"/>
    </style:style>
    <style:style style:name="T5" style:family="text">
      <style:text-properties officeooo:rsid="001080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el idee </text:p>
      <text:p text:style-name="P1"/>
      <text:p text:style-name="P1"><text:s/></text:p>
      <text:p text:style-name="P1">Een spaceship simulator met de mogelijkheid om planeten en spacestations te bezoeken. </text:p>
      <text:p text:style-name="P1"/>
      <text:p text:style-name="P1">1. Ruimteschip besturen</text:p>
      <text:p text:style-name="P1">2. Navigeren door het ruimteschip (van klein tot groot)</text:p>
      <text:p text:style-name="P1">3. Mogelijkheid om te landen of aan te meren en rond te lopen</text:p>
      <text:p text:style-name="P1"/>
      <text:p text:style-name="P1"/>
      <text:p text:style-name="P1">De artstyle is gebaseerd pixelart, en is futuristisch, maar niet super futuristisch, een beetje zoals battlestar galactica. </text:p>
      <text:p text:style-name="P1"/>
      <text:p text:style-name="P1">De speler kan meerdere carriere paden doorlopen, elke met verschillende focus. </text:p>
      <text:p text:style-name="P1"/>
      <text:p text:style-name="P1">- Engineer</text:p>
      <text:p text:style-name="P1">- Crewman</text:p>
      <text:p text:style-name="P1">- Soldier</text:p>
      <text:p text:style-name="P1">- Officer</text:p>
      <text:p text:style-name="P1"/>
      <text:p text:style-name="P1"/>
      <text:p text:style-name="P2"><text:span text:style-name="T1">Het spel speelt zich af </text:span><text:span text:style-name="T2">in het jaar 2345 De mensheid heeft het zonnestelsel gekoloniseerd en heeft FTL drive uitgevonden. Ook zijn er verschillende </text:span><text:span text:style-name="Emphasis"><text:span text:style-name="T3">koloniën</text:span></text:span> <text:span text:style-name="T2">op andere planeten (nog invullen welke er zijn) </text:span></text:p>
      <text:p text:style-name="P2"/>
      <text:p text:style-name="P3">De mensheid is grotendeels verenigd in een federatie genoemd de “United Sol Confederation” Dit is een unie tussen de verschillende mogendheden in het zonnestelsel. </text:p>
      <text:p text:style-name="P3"/>
      <text:p text:style-name="P3">Voor de vorming van USC was het zonnestelsel opgedeeld in verschillende fracties. </text:p>
      <text:p text:style-name="P3"/>
      <text:p text:style-name="P3">- Luncor Republic (voormalige kolonie van aarde zelfstandig geworden door de vorming <text:s/>van een corporate syndicaat genaamd LunCorp, wat uiteen viel en de bewoners van de maan hebben gestemd voor een republiek als staatvorm, maar zetten zich af van de aarde omdat ze geen zin hadden in kapitalisme.</text:p>
      <text:p text:style-name="P3"/>
      <text:p text:style-name="P3">- Mars Alliance</text:p>
      <text:p text:style-name="P3"><text:tab/> <text:s/>voormalige aarde kolonie, het gebied van de Mars Alliance strekt zich uit tot Asteroid belt en is onafhankelijk geworden door een aantal oorlog tussen de aarde. De <text:s/>manen ganymede en IO bevatten ook kolonieen gelieerd aan de Mars Alliance. <text:s/><text:span text:style-name="T4">De mars Alliance is het zwakkere broertje van de USC, met een teruglopende populatie en een economie die stagneert valt het in het niets vergeleken bij de Aarde of the Free State of Titan. <text:s/>Er worden rond de 110 miljoen mensen op Mars. <text:s/>Een opmerkelijk feit is dat Mars zwaar gemilitariseerd is. De Mars Alliance heeft het grootste aandeel in de USC Fleet, de Mars Alliance Defence organisation is daarmee ook de grootste arbeidsgever van de planeet en domineert de economie. </text:span><text:span text:style-name="T5">De MADO is ook diep verworteld met de regering. </text:span></text:p>
      <text:p text:style-name="P3"/>
      <text:p text:style-name="P3"/>
      <text:p text:style-name="P3">- The Free state of Titan</text:p>
      <text:p text:style-name="P3"/>
      <text:p text:style-name="P3">Titan was deel van de Mars Alliance, maar heeft besloten om onafhankelijk te worden nadat 100 jaar emigratie ervoor gezorgd had dat de economie van Titan 4x keer zo groot is geworden als die <text:soft-page-break/>van Mars. Er worden inmiddels 650miljoen mensen op de maan Titan het is een economisch en industrieel powerhouse. De enige planeet met meer economische output is de Aarde zelf. </text:p>
      <text:p text:style-name="P3"/>
      <text:p text:style-name="P3"/>
      <text:p text:style-name="P3"/>
      <text:p text:style-name="P3"/>
      <text:p text:style-name="P3"/>
      <text:p text:style-name="P3">- Earth</text:p>
      <text:p text:style-name="P3"/>
      <text:p text:style-name="P3">Het culturele centrum en zetel van de macht van de huidige USC, ooit verenigd in de United Earth Federation, maar over de eeuwen uit elkaar gevallen en de UEF bestaat heden ten dage nog alleen uit Aarde/Venus en Mercurius. <text:s/>Venus en mercurius bevatten geen grote populaties. Op de aarde zelf wonen inmiddels 12 miljard mensen. </text:p>
      <text:p text:style-name="P3"/>
      <text:p text:style-name="P3"/>
      <text:p text:style-name="P4">In 2330 is er een verdrag gesloten dat alle mogendheden van het zonnestel verenigd in de United Sol Confederation. De USC verenigd alle mensen van het zonnestelsel onder 1 regering. De verschillende fracties bestaan echter nog steeds en hebben altijd nog invloed op hun respectievelijke territoria. </text:p>
      <text:p text:style-name="P4"/>
      <text:p text:style-name="P4"/>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7T18:46:07.440000000</meta:creation-date>
    <dc:date>2023-07-17T20:01:07.495000000</dc:date>
    <meta:editing-duration>PT1H14M58S</meta:editing-duration>
    <meta:editing-cycles>5</meta:editing-cycles>
    <meta:generator>LibreOffice/7.4.3.2$Windows_X86_64 LibreOffice_project/1048a8393ae2eeec98dff31b5c133c5f1d08b890</meta:generator>
    <meta:document-statistic meta:table-count="0" meta:image-count="0" meta:object-count="0" meta:page-count="2" meta:paragraph-count="23" meta:word-count="496" meta:character-count="3032" meta:non-whitespace-character-count="2537"/>
  </office:meta>
</office:document-meta>
</file>